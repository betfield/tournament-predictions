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1.6953in"/>
    </style:style>
    <style:style style:name="co8" style:family="table-column">
      <style:table-column-properties fo:break-before="auto" style:column-width="1.848in"/>
    </style:style>
    <style:style style:name="co9" style:family="table-column">
      <style:table-column-properties fo:break-before="auto" style:column-width="1.880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872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2.1661in"/>
    </style:style>
    <style:style style:name="co14" style:family="table-column">
      <style:table-column-properties fo:break-before="auto" style:column-width="0.47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Date_20_Time_20_City_20_Venue_20_Home_20_Team_20_Away_20_Team_20_Round_20_Gr...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28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8128">
      <style:table-cell-properties style:text-align-source="fix" style:repeat-content="false" fo:wrap-option="no-wrap" style:direction="ltr" style:rotation-angle="0" style:shrink-to-fit="false" loext:vertical-justify="auto"/>
      <style:paragraph-properties fo:text-align="end" fo:margin-left="0in" style:writing-mode="page"/>
      <style:text-properties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shrink-to-fit="false" css3t:text-justify="auto"/>
      <style:paragraph-properties fo:margin-left="0in" style:writing-mode="page"/>
      <style:text-properties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40">
      <style:table-cell-properties style:text-align-source="fix" style:repeat-content="false" fo:wrap-option="wrap"/>
      <style:paragraph-properties fo:text-align="end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x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office:value-type="string">
            <text:p>competition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roun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s</text:p>
          </table:table-cell>
          <table:table-cell table:style-name="ce1" office:value-type="string">
            <text:p>home_team</text:p>
          </table:table-cell>
          <table:table-cell table:style-name="ce1" office:value-type="string">
            <text:p>away_team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venue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1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1T19:00Z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2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12T2:00Z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2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2T19:00Z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3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3T1:00Z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3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3T19:00Z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3T22:00Z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4T1:00Z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07H00M00S">
            <text:p>7:00</text:p>
          </table:table-cell>
          <table:table-cell table:style-name="ce1" office:value-type="string">
            <text:p>2026-06-14T4:00Z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14T17:00Z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14T20:00Z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3" office:value-type="time" office:time-value="PT02H00M00S">
            <text:p>2:00</text:p>
          </table:table-cell>
          <table:table-cell table:style-name="ce1" office:value-type="string">
            <text:p>2026-06-14T23:00Z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15T2:00Z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3" office:value-type="time" office:time-value="PT19H00M00S">
            <text:p>19:00</text:p>
          </table:table-cell>
          <table:table-cell table:style-name="ce1" office:value-type="string">
            <text:p>2026-06-15T16:00Z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5T19:00Z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5T22:00Z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6T1:00Z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6T19:00Z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6T22:00Z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7T1:00Z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07H00M00S">
            <text:p>7:00</text:p>
          </table:table-cell>
          <table:table-cell table:style-name="ce1" office:value-type="string">
            <text:p>2026-06-17T4:00Z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17T17:00Z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17T20:00Z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. juuni</text:p>
          </table:table-cell>
          <table:table-cell table:style-name="ce3" office:value-type="time" office:time-value="PT02H00M00S">
            <text:p>2:00</text:p>
          </table:table-cell>
          <table:table-cell table:style-name="ce1" office:value-type="string">
            <text:p>2026-06-17T23:00Z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18T2:00Z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. juuni</text:p>
          </table:table-cell>
          <table:table-cell table:style-name="ce3" office:value-type="time" office:time-value="PT19H00M00S">
            <text:p>19:00</text:p>
          </table:table-cell>
          <table:table-cell table:style-name="ce1" office:value-type="string">
            <text:p>2026-06-18T16:00Z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8T19:00Z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8T22:00Z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9T1:00Z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9T19:00Z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9T22:00Z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03H30M00S">
            <text:p>3:30</text:p>
          </table:table-cell>
          <table:table-cell table:style-name="ce1" office:value-type="string">
            <text:p>2026-06-20T0:30Z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0T3:00Z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20T17:00Z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20T20:00Z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1T0:00Z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3" office:value-type="time" office:time-value="PT07H00M00S">
            <text:p>7:00</text:p>
          </table:table-cell>
          <table:table-cell table:style-name="ce1" office:value-type="string">
            <text:p>2026-06-21T4:00Z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4" office:value-type="time" office:time-value="PT19H00M00S">
            <text:p>19:00</text:p>
          </table:table-cell>
          <table:table-cell table:style-name="ce5" office:value-type="string">
            <text:p>2026-06-21T16:00Z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1T19:00Z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21T22:00Z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22T1:00Z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3T00:00Z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2T21:00Z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22T17:00Z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3T3:00Z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23T17:00Z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24T02:00Z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23T20:00Z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02H00M00S">
            <text:p>2:00</text:p>
          </table:table-cell>
          <table:table-cell table:style-name="ce1" office:value-type="string">
            <text:p>2026-06-23T23:00Z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24T22:00Z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24T22:00Z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25T01:00Z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25T01:00Z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4T19:00Z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4T19:00Z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25T20:00Z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25T20:00Z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2H00M00S">
            <text:p>2:00</text:p>
          </table:table-cell>
          <table:table-cell table:style-name="ce1" office:value-type="string">
            <text:p>2026-06-25T23:00Z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2H00M00S">
            <text:p>2:00</text:p>
          </table:table-cell>
          <table:table-cell table:style-name="ce1" office:value-type="string">
            <text:p>2026-06-25T23:00Z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26T02:00Z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26T02:00Z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6T19:00Z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6T19:00Z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7T0:00Z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7T0:00Z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7T3:00Z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7T3:00Z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7T21:00Z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7T21:00Z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28T02:00Z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28T02:00Z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2H30M00S">
            <text:p>2:30</text:p>
          </table:table-cell>
          <table:table-cell table:style-name="ce1" office:value-type="string">
            <text:p>2026-06-27T23:30Z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2H30M00S">
            <text:p>2:30</text:p>
          </table:table-cell>
          <table:table-cell table:style-name="ce1" office:value-type="string">
            <text:p>2026-06-27T23:30Z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8.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8T19:00Z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9.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29T17:00Z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F2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9.juuni</text:p>
          </table:table-cell>
          <table:table-cell table:style-name="ce3" office:value-type="time" office:time-value="PT23H30M00S">
            <text:p>23:30</text:p>
          </table:table-cell>
          <table:table-cell table:style-name="ce1" office:value-type="string">
            <text:p>2026-06-29T20:30Z</text:p>
          </table:table-cell>
          <table:table-cell table:style-name="ce1" office:value-type="string">
            <text:p>E1</text:p>
          </table:table-cell>
          <table:table-cell table:style-name="ce1" office:value-type="string">
            <text:p>ABCDF3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0.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30T01:00Z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0.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30T17:00Z</text:p>
          </table:table-cell>
          <table:table-cell table:style-name="ce1" office:value-type="string">
            <text:p>E2</text:p>
          </table:table-cell>
          <table:table-cell table:style-name="ce1" office:value-type="string">
            <text:p>I2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1.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30T21:00Z</text:p>
          </table:table-cell>
          <table:table-cell table:style-name="ce1" office:value-type="string">
            <text:p>I1</text:p>
          </table:table-cell>
          <table:table-cell table:style-name="ce1" office:value-type="string">
            <text:p>CDFGH3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1.juul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7-01T01:00Z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CEFHI3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1.juuli</text:p>
          </table:table-cell>
          <table:table-cell table:style-name="ce3" office:value-type="time" office:time-value="PT19H00M00S">
            <text:p>19:00</text:p>
          </table:table-cell>
          <table:table-cell table:style-name="ce1" office:value-type="string">
            <text:p>2026-07-01T16:00Z</text:p>
          </table:table-cell>
          <table:table-cell table:style-name="ce1" office:value-type="string">
            <text:p>L1</text:p>
          </table:table-cell>
          <table:table-cell table:style-name="ce1" office:value-type="string">
            <text:p>EHIJK3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1.juul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7-01T20:00Z</text:p>
          </table:table-cell>
          <table:table-cell table:style-name="ce1" office:value-type="string">
            <text:p>G1</text:p>
          </table:table-cell>
          <table:table-cell table:style-name="ce1" office:value-type="string">
            <text:p>AEHIJ3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2.juul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7-02T00:00Z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BEFIJ3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2.juul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7-02T19:00Z</text:p>
          </table:table-cell>
          <table:table-cell table:style-name="ce1" office:value-type="string">
            <text:p>H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3.juuli</text:p>
          </table:table-cell>
          <table:table-cell table:style-name="ce3" office:value-type="time" office:time-value="PT02H00M00S">
            <text:p>2:00</text:p>
          </table:table-cell>
          <table:table-cell table:style-name="ce1" office:value-type="string">
            <text:p>2026-07-02T23:00Z</text:p>
          </table:table-cell>
          <table:table-cell table:style-name="ce1" office:value-type="string">
            <text:p>K2</text:p>
          </table:table-cell>
          <table:table-cell table:style-name="ce1" office:value-type="string">
            <text:p>L2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3.juul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7-03T03:00Z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EFGIJ3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3.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3T18:00Z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2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4.juul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7-03T22:00Z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H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4.juuli</text:p>
          </table:table-cell>
          <table:table-cell table:style-name="ce3" office:value-type="time" office:time-value="PT04H30M00S">
            <text:p>4:30</text:p>
          </table:table-cell>
          <table:table-cell table:style-name="ce1" office:value-type="string">
            <text:p>2026-07-04T01:30Z</text:p>
          </table:table-cell>
          <table:table-cell table:style-name="ce1" office:value-type="string">
            <text:p>K1</text:p>
          </table:table-cell>
          <table:table-cell table:style-name="ce1" office:value-type="string">
            <text:p>DEIJL3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4.juul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7-04T17:00Z</text:p>
          </table:table-cell>
          <table:table-cell table:style-name="ce1" office:value-type="string">
            <text:p>Winner 73</text:p>
          </table:table-cell>
          <table:table-cell table:style-name="ce1" office:value-type="string">
            <text:p>Winner 75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5.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04T21:00Z</text:p>
          </table:table-cell>
          <table:table-cell table:style-name="ce1" office:value-type="string">
            <text:p>Winner 74</text:p>
          </table:table-cell>
          <table:table-cell table:style-name="ce1" office:value-type="string">
            <text:p>Winner 77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5.juul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7-05T20:00Z</text:p>
          </table:table-cell>
          <table:table-cell table:style-name="ce1" office:value-type="string">
            <text:p>Winner 76</text:p>
          </table:table-cell>
          <table:table-cell table:style-name="ce1" office:value-type="string">
            <text:p>Winner 78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6.juul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7-06T00:00Z</text:p>
          </table:table-cell>
          <table:table-cell table:style-name="ce1" office:value-type="string">
            <text:p>Winner 79</text:p>
          </table:table-cell>
          <table:table-cell table:style-name="ce1" office:value-type="string">
            <text:p>Winner 80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6.juul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7-06T19:00Z</text:p>
          </table:table-cell>
          <table:table-cell table:style-name="ce1" office:value-type="string">
            <text:p>Winner 83</text:p>
          </table:table-cell>
          <table:table-cell table:style-name="ce1" office:value-type="string">
            <text:p>Winner 84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7.juul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7-07T00:00Z</text:p>
          </table:table-cell>
          <table:table-cell table:style-name="ce1" office:value-type="string">
            <text:p>Winner 81</text:p>
          </table:table-cell>
          <table:table-cell table:style-name="ce1" office:value-type="string">
            <text:p>Winner 82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7.juuli</text:p>
          </table:table-cell>
          <table:table-cell table:style-name="ce3" office:value-type="time" office:time-value="PT19H00M00S">
            <text:p>19:00</text:p>
          </table:table-cell>
          <table:table-cell table:style-name="ce1" office:value-type="string">
            <text:p>2026-07-07T16:00Z</text:p>
          </table:table-cell>
          <table:table-cell table:style-name="ce1" office:value-type="string">
            <text:p>Winner 86</text:p>
          </table:table-cell>
          <table:table-cell table:style-name="ce1" office:value-type="string">
            <text:p>Winner 88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7.juul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7-07T20:00Z</text:p>
          </table:table-cell>
          <table:table-cell table:style-name="ce1" office:value-type="string">
            <text:p>Winner 85</text:p>
          </table:table-cell>
          <table:table-cell table:style-name="ce1" office:value-type="string">
            <text:p>Winner 87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9.juul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7-09T20:00Z</text:p>
          </table:table-cell>
          <table:table-cell table:style-name="ce1" office:value-type="string">
            <text:p>Winner 89</text:p>
          </table:table-cell>
          <table:table-cell table:style-name="ce1" office:value-type="string">
            <text:p>Winner 90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0.juul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7-10T19:00Z</text:p>
          </table:table-cell>
          <table:table-cell table:style-name="ce1" office:value-type="string">
            <text:p>Winner 93</text:p>
          </table:table-cell>
          <table:table-cell table:style-name="ce1" office:value-type="string">
            <text:p>Winner 94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2.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11T21:00Z</text:p>
          </table:table-cell>
          <table:table-cell table:style-name="ce1" office:value-type="string">
            <text:p>Winner 91</text:p>
          </table:table-cell>
          <table:table-cell table:style-name="ce1" office:value-type="string">
            <text:p>Winner 9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2.juul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7-12T01:00Z</text:p>
          </table:table-cell>
          <table:table-cell table:style-name="ce1" office:value-type="string">
            <text:p>Winner 95</text:p>
          </table:table-cell>
          <table:table-cell table:style-name="ce1" office:value-type="string">
            <text:p>Winner 96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SF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4.juul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7-14T19:00Z</text:p>
          </table:table-cell>
          <table:table-cell table:style-name="ce1" office:value-type="string">
            <text:p>Winner 97</text:p>
          </table:table-cell>
          <table:table-cell table:style-name="ce1" office:value-type="string">
            <text:p>Winner 98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SF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5.juul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7-15T19:00Z</text:p>
          </table:table-cell>
          <table:table-cell table:style-name="ce1" office:value-type="string">
            <text:p>Winner 99</text:p>
          </table:table-cell>
          <table:table-cell table:style-name="ce1" office:value-type="string">
            <text:p>Winner 100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FI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9.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18T21:00Z</text:p>
          </table:table-cell>
          <table:table-cell table:style-name="ce1" office:value-type="string">
            <text:p>Loser 101</text:p>
          </table:table-cell>
          <table:table-cell table:style-name="ce1" office:value-type="string">
            <text:p>Loser 10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FI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9.juul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7-19T19:00Z</text:p>
          </table:table-cell>
          <table:table-cell table:style-name="ce1" office:value-type="string">
            <text:p>Winner 101</text:p>
          </table:table-cell>
          <table:table-cell table:style-name="ce1" office:value-type="string">
            <text:p>Winner 102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style-name="ce6"/>
          <table:table-cell table:style-name="ce8"/>
          <table:table-cell table:style-name="ce10"/>
          <table:table-cell table:number-columns-repeated="1011"/>
        </table:table-row>
        <table:table-row table:style-name="ro1" table:number-rows-repeated="895">
          <table:table-cell table:number-columns-repeated="4"/>
          <table:table-cell table:style-name="ce1"/>
          <table:table-cell table:number-columns-repeated="1019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2" table:print="false">
        <office:forms form:automatic-focus="false" form:apply-design-mode="false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row table:style-name="ro1">
          <table:table-cell office:value-type="string">
            <text:p>name_eng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group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hhiko</text:p>
          </table:table-cell>
          <table:table-cell office:value-type="string">
            <text:p>mex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Lõuna-Korea</text:p>
          </table:table-cell>
          <table:table-cell office:value-type="string">
            <text:p>kor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Kanada</text:p>
          </table:table-cell>
          <table:table-cell office:value-type="string">
            <text:p>can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meerika Ühendriigid</text:p>
          </table:table-cell>
          <table:table-cell office:value-type="string">
            <text:p>usa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Katar</text:p>
          </table:table-cell>
          <table:table-cell office:value-type="string">
            <text:p>qat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siilia</text:p>
          </table:table-cell>
          <table:table-cell office:value-type="string">
            <text:p>bra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traalia</text:p>
          </table:table-cell>
          <table:table-cell office:value-type="string">
            <text:p>au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aksamaa</text:p>
          </table:table-cell>
          <table:table-cell office:value-type="string">
            <text:p>deu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Holland</text:p>
          </table:table-cell>
          <table:table-cell office:value-type="string">
            <text:p>nld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Côte d'Ivoire</text:p>
          </table:table-cell>
          <table:table-cell office:value-type="string">
            <text:p>Elevandiluurannik</text:p>
          </table:table-cell>
          <table:table-cell office:value-type="string">
            <text:p>civ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Rootsi</text:p>
          </table:table-cell>
          <table:table-cell office:value-type="string">
            <text:p>sw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Hispaania</text:p>
          </table:table-cell>
          <table:table-cell office:value-type="string">
            <text:p>esp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gia</text:p>
          </table:table-cell>
          <table:table-cell office:value-type="string">
            <text:p>bel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di Araabia</text:p>
          </table:table-cell>
          <table:table-cell office:value-type="string">
            <text:p>sau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Iraan</text:p>
          </table:table-cell>
          <table:table-cell office:value-type="string">
            <text:p>irn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Prantsusmaa</text:p>
          </table:table-cell>
          <table:table-cell office:value-type="string">
            <text:p>fra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raak</text:p>
          </table:table-cell>
          <table:table-cell office:value-type="string">
            <text:p>irq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2"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2"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2"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Inglismaa</text:p>
          </table:table-cell>
          <table:table-cell office:value-type="string">
            <text:p>eng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Lõuna-Aafrika Vabariik</text:p>
          </table:table-cell>
          <table:table-cell office:value-type="string">
            <text:p>zaf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Czechia</text:p>
          </table:table-cell>
          <table:table-cell office:value-type="string">
            <text:p>Tšehhi</text:p>
          </table:table-cell>
          <table:table-cell office:value-type="string">
            <text:p>cz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Bosnia &amp; Herzegovina</text:p>
          </table:table-cell>
          <table:table-cell office:value-type="string">
            <text:p>Bosnia ja Hertsegoviina</text:p>
          </table:table-cell>
          <table:table-cell office:value-type="string">
            <text:p>bih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Šveits</text:p>
          </table:table-cell>
          <table:table-cell office:value-type="string">
            <text:p>che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oko</text:p>
          </table:table-cell>
          <table:table-cell office:value-type="string">
            <text:p>mar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Scotland</text:p>
          </table:table-cell>
          <table:table-cell office:value-type="string">
            <text:p>Šotimaa</text:p>
          </table:table-cell>
          <table:table-cell office:value-type="string">
            <text:p>sct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Türkiye</text:p>
          </table:table-cell>
          <table:table-cell office:value-type="string">
            <text:p>Türgi</text:p>
          </table:table-cell>
          <table:table-cell office:value-type="string">
            <text:p>tur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cuw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aapan</text:p>
          </table:table-cell>
          <table:table-cell office:value-type="string">
            <text:p>jpn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eesia</text:p>
          </table:table-cell>
          <table:table-cell office:value-type="string">
            <text:p>tun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Egiptus</text:p>
          </table:table-cell>
          <table:table-cell office:value-type="string">
            <text:p>egy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2"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Uus-Meremaa</text:p>
          </table:table-cell>
          <table:table-cell office:value-type="string">
            <text:p>nzl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2"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rra</text:p>
          </table:table-cell>
          <table:table-cell office:value-type="string">
            <text:p>nor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Alžeeria</text:p>
          </table:table-cell>
          <table:table-cell office:value-type="string">
            <text:p>dza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rdaania</text:p>
          </table:table-cell>
          <table:table-cell office:value-type="string">
            <text:p>jor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ongo DR</text:p>
          </table:table-cell>
          <table:table-cell office:value-type="string">
            <text:p>Kongo DV</text:p>
          </table:table-cell>
          <table:table-cell office:value-type="string">
            <text:p>cod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orvaatia</text:p>
          </table:table-cell>
          <table:table-cell office:value-type="string">
            <text:p>hrv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Uzbekistan</text:p>
          </table:table-cell>
          <table:table-cell table:style-name="Default" office:value-type="string">
            <text:p>Usbekistan</text:p>
          </table:table-cell>
          <table:table-cell table:style-name="Default" office:value-type="string">
            <text:p>uzb</text:p>
          </table:table-cell>
          <table:table-cell table:style-name="Default" office:value-type="string">
            <text:p>K</text:p>
          </table:table-cell>
        </table:table-row>
      </table:table>
      <table:database-ranges>
        <table:database-range table:name="__Anonymous_Sheet_DB__1" table:target-range-address="Fixtures.A1:Fixtures.J1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5">05/25/2026</text:date>, <text:time>11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e_20_Time_20_City_20_Venue_20_Home_20_Team_20_Away_20_Team_20_Round_20_Gr..." style:display-name="PageStyle_Date Time City Venue Home Team Away Team Round Gr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5-25T11:57:49.49</dc:date>
    <meta:editing-duration>PT3H32M43S</meta:editing-duration>
    <meta:editing-cycles>11</meta:editing-cycles>
    <meta:document-statistic meta:table-count="2" meta:cell-count="1246" meta:object-count="0"/>
  </office:meta>
</office:document-meta>
</file>